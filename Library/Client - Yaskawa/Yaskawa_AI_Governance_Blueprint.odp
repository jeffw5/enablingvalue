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308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solid" svg:stroke-width="0.026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3087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71cm" svg:stroke-color="#0066cc" svg:stroke-linecap="butt" draw:fill="solid" draw:fill-color="#f5f5f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26cm" svg:stroke-color="#003087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26cm" svg:stroke-color="#ff6b35" svg:stroke-linecap="butt" draw:fill="solid" draw:fill-color="#ff6b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26cm" svg:stroke-color="#00a651" svg:stroke-linecap="butt" draw:fill="solid" draw:fill-color="#00a65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7" style:family="graphic" style:parent-style-name="standard" style:list-style-name="L6">
      <style:graphic-properties draw:stroke="solid" svg:stroke-width="0.071cm" svg:stroke-color="#333333" svg:stroke-linecap="butt" draw:fill="solid" draw:fill-color="#f5f5f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26cm" svg:stroke-color="#003087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26cm" svg:stroke-color="#003087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26cm" svg:stroke-color="#003087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26cm" svg:stroke-color="#003087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71cm" svg:stroke-color="#003087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71cm" svg:stroke-color="#003087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71cm" svg:stroke-color="#003087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71cm" svg:stroke-color="#003087" svg:stroke-linecap="butt" draw:fill="solid" draw:fill-color="#ff6b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71cm" svg:stroke-color="#003087" svg:stroke-linecap="butt" draw:fill="solid" draw:fill-color="#ff6b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71cm" svg:stroke-color="#003087" svg:stroke-linecap="butt" draw:fill="solid" draw:fill-color="#ff6b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3" style:family="graphic" style:parent-style-name="standard" style:list-style-name="L6">
      <style:graphic-properties draw:stroke="solid" svg:stroke-width="0.053cm" svg:stroke-color="#333333" svg:stroke-linecap="butt" draw:fill="solid" draw:fill-color="#f5f5f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53cm" svg:stroke-color="#333333" svg:stroke-linecap="butt" draw:fill="solid" draw:fill-color="#ff6b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53cm" svg:stroke-color="#333333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53cm" svg:stroke-color="#333333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53cm" svg:stroke-color="#333333" svg:stroke-linecap="butt" draw:fill="solid" draw:fill-color="#33333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26cm" svg:stroke-color="#003087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003087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003087" svg:stroke-linecap="butt" draw:fill="solid" draw:fill-color="#ff6b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35cm" svg:stroke-color="#003087" svg:stroke-linecap="butt" draw:fill="solid" draw:fill-color="#00a65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35cm" svg:stroke-color="#003087" svg:stroke-linecap="butt" draw:fill="solid" draw:fill-color="#8b478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35cm" svg:stroke-color="#003087" svg:stroke-linecap="butt" draw:fill="solid" draw:fill-color="#ff95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003087" svg:stroke-linecap="butt" draw:fill="solid" draw:fill-color="#00a8e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26cm" svg:stroke-color="#003087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26cm" svg:stroke-color="#ff6b35" svg:stroke-linecap="butt" draw:fill="solid" draw:fill-color="#ff6b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26cm" svg:stroke-color="#00a651" svg:stroke-linecap="butt" draw:fill="solid" draw:fill-color="#00a65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26cm" svg:stroke-color="#003087" svg:stroke-linecap="butt" draw:fill="solid" draw:fill-color="#0030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6cm" svg:stroke-color="#0066cc" svg:stroke-linecap="butt" draw:fill="solid" draw:fill-color="#0066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26cm" svg:stroke-color="#ff6b35" svg:stroke-linecap="butt" draw:fill="solid" draw:fill-color="#ff6b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26cm" svg:stroke-color="#8b4789" svg:stroke-linecap="butt" draw:fill="solid" draw:fill-color="#8b478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26cm" svg:stroke-color="#ff6b35" svg:stroke-linecap="butt" draw:fill="solid" draw:fill-color="#ff6b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P7" style:family="paragraph">
      <style:paragraph-properties fo:margin-left="0cm" fo:margin-right="0cm" fo:margin-top="0cm" fo:margin-bottom="0.706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.282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.706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solid" draw:fill-color="#003087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0066cc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.423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loext:graphic-properties draw:fill="solid" draw:fill-color="#f5f5f5"/>
      <style:paragraph-properties fo:margin-left="0cm" fo:margin-right="0cm" fo:margin-top="0cm" fo:margin-bottom="0.423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f6b35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solid" draw:fill-color="#00a651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solid" draw:fill-color="#f5f5f5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.353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0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1" style:family="paragraph">
      <loext:graphic-properties draw:fill="solid" draw:fill-color="#8b4789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2" style:family="paragraph">
      <loext:graphic-properties draw:fill="solid" draw:fill-color="#ff9500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solid" draw:fill-color="#00a8e1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7" style:family="paragraph">
      <loext:graphic-properties draw:fill="solid" draw:fill-color="#003087"/>
      <style:paragraph-properties fo:margin-left="0cm" fo:margin-right="0cm" fo:margin-top="0cm" fo:margin-bottom="0.423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8" style:family="paragraph">
      <loext:graphic-properties draw:fill="solid" draw:fill-color="#0066cc"/>
      <style:paragraph-properties fo:margin-left="0cm" fo:margin-right="0cm" fo:margin-top="0cm" fo:margin-bottom="0.423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9" style:family="paragraph">
      <loext:graphic-properties draw:fill="solid" draw:fill-color="#ff6b35"/>
      <style:paragraph-properties fo:margin-left="0cm" fo:margin-right="0cm" fo:margin-top="0cm" fo:margin-bottom="0.423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solid" draw:fill-color="#8b4789"/>
      <style:paragraph-properties fo:margin-left="0cm" fo:margin-right="0cm" fo:margin-top="0cm" fo:margin-bottom="0.423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1" style:family="paragraph">
      <style:paragraph-properties fo:margin-left="0cm" fo:margin-right="0cm" fo:margin-top="0cm" fo:margin-bottom="0.494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.494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cm" fo:margin-bottom="0.353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4" style:family="paragraph">
      <loext:graphic-properties draw:fill="solid" draw:fill-color="#ff6b35"/>
      <style:paragraph-properties fo:margin-left="0cm" fo:margin-right="0cm" fo:margin-top="0cm" fo:margin-bottom="0.353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ff6b3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5f5f5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Calibri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Calibri" fo:font-size="38pt" fo:letter-spacing="normal" fo:font-style="normal" style:text-underline-style="none" fo:font-weight="bold" fo:background-color="transparent" style:font-size-asian="38pt" style:font-style-asian="normal" style:font-weight-asian="bold" style:font-size-complex="38pt" style:font-style-complex="normal" style:font-weight-complex="bold"/>
    </style:style>
    <style:style style:name="T2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30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6b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5f5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308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2" draw:layer="layout" svg:width="7.619cm" svg:height="2.031cm" svg:x="8.89cm" svg:y="2.54cm">
          <text:p text:style-name="P1"><text:span text:style-name="T1">YASKAW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20.319cm" svg:height="4.821cm" svg:x="2.54cm" svg:y="6.35cm">
          <text:p text:style-name="P1"><text:span text:style-name="T2">AI &amp; Governance Blue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3" draw:layer="layout" svg:width="15.04cm" svg:height="1.435cm" svg:x="5.179cm" svg:y="10.16cm">
          <text:p text:style-name="P1"><text:span text:style-name="T3">Enterprise AI Integration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3" draw:layer="layout" svg:width="10.439cm" svg:height="0.842cm" svg:x="7.48cm" svg:y="16.51cm">
          <text:p text:style-name="P1"><text:span text:style-name="T4">December 2024 | Confidential - Internal Use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cutive Summary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xecutive Summary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TextBox 3" draw:style-name="gr6" draw:text-style-name="P9" draw:layer="layout" svg:width="22.859cm" svg:height="7.274cm" svg:x="1.27cm" svg:y="4.572cm">
          <text:p text:style-name="P7"><text:span text:style-name="T6">Comprehensive framework for formalizing AI across Yaskawa America, integrating with SAP ERP/CRM systems while establishing robust governance.</text:span></text:p>
          <text:p text:style-name="P8"><text:span text:style-name="T7">Centralized AI Governance Office with clear leadership roles</text:span></text:p>
          <text:p text:style-name="P8"><text:span text:style-name="T7">Multi-layered framework covering data, BI, semantics, and AI operations</text:span></text:p>
          <text:p text:style-name="P8"><text:span text:style-name="T7">Deep SAP integration across manufacturing, supply chain, and customer experience</text:span></text:p>
          <text:p text:style-name="P8"><text:span text:style-name="T7">Responsible AI with validation, monitoring, and ethics oversight</text:span></text:p>
          <text:p text:style-name="P8"><text:span text:style-name="T7">18-month phased implementation from foundation to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I &amp; Data Organization Structure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8">AI &amp; Data Organization Structure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ounded Rectangle 3" draw:style-name="gr7" draw:text-style-name="P10" draw:layer="layout" svg:width="7.619cm" svg:height="1.777cm" svg:x="8.89cm" svg:y="5.08cm">
          <text:p text:style-name="P1"><text:span text:style-name="T9">Chief Data Offic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8" draw:text-style-name="P11" draw:layer="layout" svg:width="4.317cm" svg:height="2.031cm" svg:x="3.81cm" svg:y="8.128cm">
          <text:p text:style-name="P1"><text:span text:style-name="T10">AI Governance</text:span><text:span text:style-name="T10"><text:line-break/></text:span><text:span text:style-name="T10">Lea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9" draw:text-style-name="P11" draw:layer="layout" svg:width="4.317cm" svg:height="2.031cm" svg:x="8.89cm" svg:y="8.128cm">
          <text:p text:style-name="P1"><text:span text:style-name="T10">Model Risk</text:span><text:span text:style-name="T10"><text:line-break/></text:span><text:span text:style-name="T10">Offic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10" draw:text-style-name="P11" draw:layer="layout" svg:width="4.317cm" svg:height="2.031cm" svg:x="13.97cm" svg:y="8.128cm">
          <text:p text:style-name="P1"><text:span text:style-name="T10">Responsible AI</text:span><text:span text:style-name="T10"><text:line-break/></text:span><text:span text:style-name="T10">Cont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1" draw:text-style-name="P11" draw:layer="layout" svg:width="4.317cm" svg:height="2.031cm" svg:x="19.05cm" svg:y="8.128cm">
          <text:p text:style-name="P1"><text:span text:style-name="T10">Enterprise</text:span><text:span text:style-name="T10"><text:line-break/></text:span><text:span text:style-name="T10">Archite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2" draw:text-style-name="P13" draw:layer="layout" svg:width="15.239cm" svg:height="5.587cm" svg:x="5.08cm" svg:y="11.43cm">
          <text:p text:style-name="P12"><text:span text:style-name="T11">Governance Council</text:span></text:p>
          <text:p text:style-name="P1"><text:span text:style-name="T12">Business Domains • Legal &amp; Compliance • Information Security</text:span></text:p>
          <text:p text:style-name="P1"><text:span text:style-name="T12">Engineering &amp; Operations • Supply Chain • Finan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-Layered Governance Framework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8">Multi-Layered Governance Framework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ectangle 3" draw:style-name="gr13" draw:text-style-name="P10" draw:layer="layout" svg:width="4.571cm" svg:height="7.619cm" svg:x="3.048cm" svg:y="6.35cm">
          <text:p text:style-name="P1"><text:span text:style-name="T13">Data</text:span><text:span text:style-name="T13"><text:line-break/></text:span><text:span text:style-name="T13">Gover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4" draw:text-style-name="P11" draw:layer="layout" svg:width="4.571cm" svg:height="7.619cm" svg:x="8.89cm" svg:y="6.35cm">
          <text:p text:style-name="P1"><text:span text:style-name="T13">Business</text:span><text:span text:style-name="T13"><text:line-break/></text:span><text:span text:style-name="T13">Intellig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14" draw:layer="layout" svg:width="4.571cm" svg:height="7.619cm" svg:x="14.732cm" svg:y="6.35cm">
          <text:p text:style-name="P1"><text:span text:style-name="T13">Semantic</text:span><text:span text:style-name="T13"><text:line-break/></text:span><text:span text:style-name="T13">Gover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5" draw:layer="layout" svg:width="4.571cm" svg:height="7.619cm" svg:x="20.574cm" svg:y="6.35cm">
          <text:p text:style-name="P1"><text:span text:style-name="T13">AI</text:span><text:span text:style-name="T13"><text:line-break/></text:span><text:span text:style-name="T13">Gover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6" draw:layer="layout" svg:width="21.335cm" svg:height="2.031cm" svg:x="2.032cm" svg:y="14.478cm">
          <text:p text:style-name="P1"><text:span text:style-name="T14">Enterprise Architecture &amp; Infra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I Use Case Lifecycle Phases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8">AI Use Case Lifecycle Phase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ounded Rectangle 3" draw:style-name="gr18" draw:text-style-name="P11" draw:layer="layout" svg:width="10.159cm" svg:height="1.396cm" svg:x="3.81cm" svg:y="5.588cm">
          <text:p text:style-name="P1"><text:span text:style-name="T15">1. Use Case Intak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19" draw:text-style-name="P10" draw:layer="layout" svg:width="10.159cm" svg:height="1.396cm" svg:x="3.81cm" svg:y="7.239cm">
          <text:p text:style-name="P1"><text:span text:style-name="T15">2. Risk Assessm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20" draw:text-style-name="P11" draw:layer="layout" svg:width="10.159cm" svg:height="1.396cm" svg:x="3.81cm" svg:y="8.89cm">
          <text:p text:style-name="P1"><text:span text:style-name="T15">3. Solution Desig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21" draw:text-style-name="P10" draw:layer="layout" svg:width="10.159cm" svg:height="1.396cm" svg:x="3.81cm" svg:y="10.541cm">
          <text:p text:style-name="P1"><text:span text:style-name="T15">4. Register Model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22" draw:text-style-name="P11" draw:layer="layout" svg:width="10.159cm" svg:height="1.396cm" svg:x="3.81cm" svg:y="12.192cm">
          <text:p text:style-name="P1"><text:span text:style-name="T15">5. Legal Revie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3" draw:text-style-name="P10" draw:layer="layout" svg:width="10.159cm" svg:height="1.396cm" svg:x="3.81cm" svg:y="13.843cm">
          <text:p text:style-name="P1"><text:span text:style-name="T15">6. Pre-Deploy Revie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4" draw:text-style-name="P11" draw:layer="layout" svg:width="10.159cm" svg:height="1.396cm" svg:x="3.81cm" svg:y="15.494cm">
          <text:p text:style-name="P1"><text:span text:style-name="T15">7. Governance Revie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25" draw:text-style-name="P19" draw:layer="layout" svg:width="9.397cm" svg:height="6.123cm" svg:x="14.732cm" svg:y="5.588cm">
          <text:p text:style-name="P17"><text:span text:style-name="T16">Key Activities:</text:span></text:p>
          <text:p text:style-name="P18"><text:span text:style-name="T17">Business problem identification</text:span></text:p>
          <text:p text:style-name="P18"><text:span text:style-name="T17">Risk scoring &amp; mitigation</text:span></text:p>
          <text:p text:style-name="P18"><text:span text:style-name="T17">Architecture blueprint</text:span></text:p>
          <text:p text:style-name="P18"><text:span text:style-name="T17">Model documentation</text:span></text:p>
          <text:p text:style-name="P18"><text:span text:style-name="T17">IP &amp; compliance review</text:span></text:p>
          <text:p text:style-name="P18"><text:span text:style-name="T17">Validation &amp; testing</text:span></text:p>
          <text:p text:style-name="P18"><text:span text:style-name="T17">Final stakeholder sign-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I Integration with SAP ERP/CRM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8">AI Integration with SAP ERP/CRM</text:span></text:p>
          </draw:text-box>
        </draw:frame>
        <draw:frame draw:name="Content Placeholder 2" presentation:style-name="pr8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ounded Rectangle 3" draw:style-name="gr26" draw:text-style-name="P10" draw:layer="layout" svg:width="7.619cm" svg:height="3.809cm" svg:x="8.89cm" svg:y="7.62cm">
          <text:p text:style-name="P1"><text:span text:style-name="T18">SAP ERP/CRM</text:span><text:span text:style-name="T18"><text:line-break/></text:span><text:span text:style-name="T18">Core Syste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27" draw:text-style-name="P11" draw:layer="layout" svg:width="3.301cm" svg:height="2.031cm" svg:x="2.54cm" svg:y="5.08cm">
          <text:p text:style-name="P1"><text:span text:style-name="T19">PM</text:span><text:span text:style-name="T19"><text:line-break/></text:span><text:span text:style-name="T19">Maintenan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28" draw:text-style-name="P11" draw:layer="layout" svg:width="3.301cm" svg:height="2.031cm" svg:x="2.54cm" svg:y="10.16cm">
          <text:p text:style-name="P1"><text:span text:style-name="T19">PP</text:span><text:span text:style-name="T19"><text:line-break/></text:span><text:span text:style-name="T19">Produ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29" draw:text-style-name="P11" draw:layer="layout" svg:width="3.301cm" svg:height="2.031cm" svg:x="2.54cm" svg:y="15.24cm">
          <text:p text:style-name="P1"><text:span text:style-name="T19">QM</text:span><text:span text:style-name="T19"><text:line-break/></text:span><text:span text:style-name="T19">Qualit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0" draw:text-style-name="P14" draw:layer="layout" svg:width="3.301cm" svg:height="2.031cm" svg:x="20.32cm" svg:y="5.08cm">
          <text:p text:style-name="P1"><text:span text:style-name="T19">MM/WM</text:span><text:span text:style-name="T19"><text:line-break/></text:span><text:span text:style-name="T19">Invento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1" draw:text-style-name="P14" draw:layer="layout" svg:width="3.301cm" svg:height="2.031cm" svg:x="20.32cm" svg:y="10.16cm">
          <text:p text:style-name="P1"><text:span text:style-name="T19">SD</text:span><text:span text:style-name="T19"><text:line-break/></text:span><text:span text:style-name="T19">Sal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2" draw:text-style-name="P14" draw:layer="layout" svg:width="3.301cm" svg:height="2.031cm" svg:x="20.32cm" svg:y="15.24cm">
          <text:p text:style-name="P1"><text:span text:style-name="T19">CRM</text:span><text:span text:style-name="T19"><text:line-break/></text:span><text:span text:style-name="T19">Custom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ical Architecture &amp; Infrastructure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0">Technical Architecture &amp; Infrastructure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ectangle 3" draw:style-name="gr33" draw:text-style-name="P16" draw:layer="layout" svg:width="20.319cm" svg:height="1.65cm" svg:x="2.54cm" svg:y="15.24cm">
          <text:p text:style-name="P1"><text:span text:style-name="T21">User Experience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4" draw:text-style-name="P14" draw:layer="layout" svg:width="20.319cm" svg:height="1.65cm" svg:x="2.54cm" svg:y="13.208cm">
          <text:p text:style-name="P1"><text:span text:style-name="T13">AI/ML Services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5" draw:text-style-name="P11" draw:layer="layout" svg:width="20.319cm" svg:height="1.65cm" svg:x="2.54cm" svg:y="11.176cm">
          <text:p text:style-name="P1"><text:span text:style-name="T13">Integration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6" draw:text-style-name="P10" draw:layer="layout" svg:width="20.319cm" svg:height="1.65cm" svg:x="2.54cm" svg:y="9.144cm">
          <text:p text:style-name="P1"><text:span text:style-name="T13">Data Platform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0" draw:layer="layout" svg:width="20.319cm" svg:height="1.65cm" svg:x="2.54cm" svg:y="7.112cm">
          <text:p text:style-name="P1"><text:span text:style-name="T13">Infrastructure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ponsible AI Framework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8">Responsible AI Framework</text:span></text:p>
          </draw:text-box>
        </draw:frame>
        <draw:frame draw:name="Content Placeholder 2" presentation:style-name="pr10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Oval 3" draw:style-name="gr38" draw:text-style-name="P10" draw:layer="layout" svg:width="5.079cm" svg:height="5.079cm" svg:x="10.16cm" svg:y="8.89cm">
          <text:p text:style-name="P1"><text:span text:style-name="T9">Responsible</text:span><text:span text:style-name="T9"><text:line-break/></text:span><text:span text:style-name="T9">AI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39" draw:text-style-name="P11" draw:layer="layout" svg:width="3.047cm" svg:height="3.047cm" svg:x="3.81cm" svg:y="5.588cm">
          <text:p text:style-name="P1"><text:span text:style-name="T19">Transparency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40" draw:text-style-name="P14" draw:layer="layout" svg:width="3.047cm" svg:height="3.047cm" svg:x="6.35cm" svg:y="11.43cm">
          <text:p text:style-name="P1"><text:span text:style-name="T19">Privacy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41" draw:text-style-name="P15" draw:layer="layout" svg:width="3.047cm" svg:height="3.047cm" svg:x="11.43cm" svg:y="15.24cm">
          <text:p text:style-name="P1"><text:span text:style-name="T19">Robustness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2" draw:text-style-name="P21" draw:layer="layout" svg:width="3.047cm" svg:height="3.047cm" svg:x="17.78cm" svg:y="11.43cm">
          <text:p text:style-name="P1"><text:span text:style-name="T19">Safety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3" draw:text-style-name="P22" draw:layer="layout" svg:width="3.047cm" svg:height="3.047cm" svg:x="20.32cm" svg:y="5.588cm">
          <text:p text:style-name="P1"><text:span text:style-name="T19">Fairness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44" draw:text-style-name="P23" draw:layer="layout" svg:width="3.047cm" svg:height="3.047cm" svg:x="13.97cm" svg:y="3.81cm">
          <text:p text:style-name="P1"><text:span text:style-name="T19">Governance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inuous Monitoring &amp; MLOps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8">Continuous Monitoring &amp; MLOps</text:span></text:p>
          </draw:text-box>
        </draw:frame>
        <draw:frame draw:name="Content Placeholder 2" presentation:style-name="pr11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TextBox 3" draw:style-name="gr45" draw:text-style-name="P25" draw:layer="layout" svg:width="11.429cm" svg:height="5.019cm" svg:x="1.27cm" svg:y="5.08cm">
          <text:p text:style-name="P24"><text:span text:style-name="T22">Model Performance Monitoring</text:span></text:p>
          <text:p text:style-name="P8"><text:span text:style-name="T12">Technical Metrics: Accuracy, latency, errors</text:span></text:p>
          <text:p text:style-name="P8"><text:span text:style-name="T12">Business Metrics: ROI, KPI impact, adoption</text:span></text:p>
          <text:p text:style-name="P8"><text:span text:style-name="T12">Data Quality: Drift, completeness, validity</text:span></text:p>
          <text:p text:style-name="P8"><text:span text:style-name="T12">Model Health: Confidence, consist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6" draw:text-style-name="P25" draw:layer="layout" svg:width="10.921cm" svg:height="4.737cm" svg:x="13.208cm" svg:y="5.08cm">
          <text:p text:style-name="P24"><text:span text:style-name="T22">Revalidation Schedule</text:span></text:p>
          <text:p text:style-name="P8"><text:span text:style-name="T12">Quarterly: Performance review, data quality</text:span></text:p>
          <text:p text:style-name="P8"><text:span text:style-name="T12">Annual: Full validation, risk assessment</text:span></text:p>
          <text:p text:style-name="P8"><text:span text:style-name="T12">Trigger-Based: Performance degradation, major cha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8-Month Implementation Roadmap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8">18-Month Implementation Roadmap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ounded Rectangle 3" draw:style-name="gr47" draw:text-style-name="P10" draw:layer="layout" svg:width="5.079cm" svg:height="3.047cm" svg:x="2.54cm" svg:y="6.35cm">
          <text:p text:style-name="P1"><text:span text:style-name="T15">Phase 1:</text:span><text:span text:style-name="T15"><text:line-break/></text:span><text:span text:style-name="T15">Found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" draw:style-name="gr48" draw:text-style-name="P3" draw:layer="layout" svg:width="2.488cm" svg:height="0.757cm" svg:x="3.835cm" svg:y="9.652cm">
          <text:p text:style-name="P1"><text:span text:style-name="T23">Months 1-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49" draw:text-style-name="P11" draw:layer="layout" svg:width="5.079cm" svg:height="3.047cm" svg:x="8.89cm" svg:y="6.35cm">
          <text:p text:style-name="P1"><text:span text:style-name="T15">Phase 2:</text:span><text:span text:style-name="T15"><text:line-break/></text:span><text:span text:style-name="T15">Quick Win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50" draw:text-style-name="P3" draw:layer="layout" svg:width="2.488cm" svg:height="0.757cm" svg:x="10.185cm" svg:y="9.652cm">
          <text:p text:style-name="P1"><text:span text:style-name="T23">Months 4-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14" draw:layer="layout" svg:width="5.079cm" svg:height="3.047cm" svg:x="15.24cm" svg:y="6.35cm">
          <text:p text:style-name="P1"><text:span text:style-name="T15">Phase 3:</text:span><text:span text:style-name="T15"><text:line-break/></text:span><text:span text:style-name="T15">Sca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52" draw:text-style-name="P3" draw:layer="layout" svg:width="2.704cm" svg:height="0.757cm" svg:x="16.427cm" svg:y="9.652cm">
          <text:p text:style-name="P1"><text:span text:style-name="T23">Months 7-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53" draw:text-style-name="P15" draw:layer="layout" svg:width="5.079cm" svg:height="3.047cm" svg:x="21.59cm" svg:y="6.35cm">
          <text:p text:style-name="P1"><text:span text:style-name="T15">Phase 4:</text:span><text:span text:style-name="T15"><text:line-break/></text:span><text:span text:style-name="T15">Optimiz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54" draw:text-style-name="P3" draw:layer="layout" svg:width="2.916cm" svg:height="0.757cm" svg:x="22.671cm" svg:y="9.652cm">
          <text:p text:style-name="P1"><text:span text:style-name="T23">Months 13-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5" draw:text-style-name="P19" draw:layer="layout" svg:width="22.859cm" svg:height="4.416cm" svg:x="1.27cm" svg:y="11.43cm">
          <text:p text:style-name="P17"><text:span text:style-name="T11">Key Deliverables:</text:span></text:p>
          <text:p text:style-name="P26"><text:span text:style-name="T17">Phase 1: AI Governance Office, model registry, data classification, use case pipeline</text:span></text:p>
          <text:p text:style-name="P26"><text:span text:style-name="T17">Phase 2: 2-3 pilot models, SAP integration patterns, training programs</text:span></text:p>
          <text:p text:style-name="P26"><text:span text:style-name="T17">Phase 3: 10+ models in production, AI development platform, self-service analytics</text:span></text:p>
          <text:p text:style-name="P26"><text:span text:style-name="T17">Phase 4: Model optimization, advanced capabilities (GenAI), center of excell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ccess Metrics &amp; KPIs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8">Success Metrics &amp; KPIs</text:span></text:p>
          </draw:text-box>
        </draw:frame>
        <draw:frame draw:name="Content Placeholder 2" presentation:style-name="pr13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ounded Rectangle 3" draw:style-name="gr56" draw:text-style-name="P27" draw:layer="layout" svg:width="10.159cm" svg:height="5.587cm" svg:x="2.032cm" svg:y="5.588cm">
          <text:p text:style-name="P12"><text:span text:style-name="T13">Governance Health</text:span></text:p>
          <text:p text:style-name="P1"><text:span text:style-name="T15">95% Models</text:span><text:span text:style-name="T15"><text:line-break/></text:span><text:span text:style-name="T15">Registered <text:s text:c="4"/>92% Policy</text:span><text:span text:style-name="T15"><text:line-break/></text:span><text:span text:style-name="T15">Complian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57" draw:text-style-name="P28" draw:layer="layout" svg:width="10.159cm" svg:height="5.587cm" svg:x="13.462cm" svg:y="5.588cm">
          <text:p text:style-name="P12"><text:span text:style-name="T13">Technical Performance</text:span></text:p>
          <text:p text:style-name="P1"><text:span text:style-name="T15">98.5% Model</text:span><text:span text:style-name="T15"><text:line-break/></text:span><text:span text:style-name="T15">Accuracy <text:s text:c="4"/>180ms Avg</text:span><text:span text:style-name="T15"><text:line-break/></text:span><text:span text:style-name="T15">Latenc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58" draw:text-style-name="P29" draw:layer="layout" svg:width="10.159cm" svg:height="5.587cm" svg:x="2.032cm" svg:y="11.938cm">
          <text:p text:style-name="P12"><text:span text:style-name="T13">Business Value</text:span></text:p>
          <text:p text:style-name="P1"><text:span text:style-name="T15">$2.5M Cost</text:span><text:span text:style-name="T15"><text:line-break/></text:span><text:span text:style-name="T15">Savings <text:s text:c="4"/>220%</text:span><text:span text:style-name="T15"><text:line-break/></text:span><text:span text:style-name="T15">RO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59" draw:text-style-name="P30" draw:layer="layout" svg:width="10.159cm" svg:height="5.587cm" svg:x="13.462cm" svg:y="11.938cm">
          <text:p text:style-name="P12"><text:span text:style-name="T13">Risk Management</text:span></text:p>
          <text:p text:style-name="P1"><text:span text:style-name="T15">0 Security</text:span><text:span text:style-name="T15"><text:line-break/></text:span><text:span text:style-name="T15">Incidents <text:s text:c="4"/>3 Risks</text:span><text:span text:style-name="T15"><text:line-break/></text:span><text:span text:style-name="T15">Mitigat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xt Steps" draw:style-name="dp3" draw:master-page-name="Title_20_and_20_Content" presentation:presentation-page-layout-name="AL1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Next Steps</text:span></text:p>
          </draw:text-box>
        </draw:frame>
        <draw:frame draw:name="Content Placeholder 2" presentation:style-name="pr14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TextBox 3" draw:style-name="gr60" draw:text-style-name="P32" draw:layer="layout" svg:width="22.859cm" svg:height="6.554cm" svg:x="1.27cm" svg:y="5.08cm">
          <text:p text:style-name="P31"><text:span text:style-name="T24">Keys to Success:</text:span></text:p>
          <text:p text:style-name="P8"><text:span text:style-name="T7">Strong executive sponsorship for AI and governance initiatives</text:span></text:p>
          <text:p text:style-name="P8"><text:span text:style-name="T7">Cross-functional collaboration across IT, engineering, and operations</text:span></text:p>
          <text:p text:style-name="P8"><text:span text:style-name="T7">Incremental implementation starting with high-value use cases</text:span></text:p>
          <text:p text:style-name="P8"><text:span text:style-name="T7">Continuous learning and adaptation based on results</text:span></text:p>
          <text:p text:style-name="P8"><text:span text:style-name="T7">Cultural transformation embracing data-driven decision-ma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61" draw:text-style-name="P34" draw:layer="layout" svg:width="22.859cm" svg:height="4.571cm" svg:x="1.27cm" svg:y="12.192cm">
          <text:p text:style-name="P33"><text:span text:style-name="T9">Immediate Actions (Next 30 Days):</text:span></text:p>
          <text:p text:style-name="P18"><text:span text:style-name="T25">Form AI Governance Office and appoint leadership roles</text:span></text:p>
          <text:p text:style-name="P18"><text:span text:style-name="T25">Identify executive sponsor and secure budget commitment</text:span></text:p>
          <text:p text:style-name="P18"><text:span text:style-name="T25">Schedule kickoff meeting with key stakeholders</text:span></text:p>
          <text:p text:style-name="P18"><text:span text:style-name="T25">Begin Phase 1 foundation activiti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24.2.7.2$Linux_X86_64 LibreOffice_project/420$Build-2</meta:generator>
    <meta:document-statistic meta:object-count="241"/>
    <meta:user-defined meta:name="AppVersion">14.0000</meta:user-defined>
    <meta:user-defined meta:name="PresentationFormat">On-screen Show (4:3)</meta:user-defined>
  </office:meta>
</office:document-meta>
</file>